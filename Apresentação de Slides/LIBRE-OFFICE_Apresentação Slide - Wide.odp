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165C16F76FFA9026.png" manifest:media-type="image/png"/>
  <manifest:file-entry manifest:full-path="Pictures/100000000000078000000438726CD619E0275A71.png" manifest:media-type="image/png"/>
  <manifest:file-entry manifest:full-path="Pictures/1000000000000780000004384231BE73F1DE7A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 Black" svg:font-family="'Arial Black'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title" style:list-style-name="L3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 Black" fo:font-size="23pt" fo:letter-spacing="normal" fo:font-style="normal" style:text-underline-style="none" fo:font-weight="bold" style:font-name-asian="Arial Black" style:font-size-asian="23pt" style:font-style-asian="normal" style:font-weight-asian="bold" style:font-name-complex="Arial Black" style:font-size-complex="23pt" style:font-style-complex="normal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2;p5" presentation:style-name="pr1" draw:text-style-name="P1" draw:layer="layout" svg:width="19.155cm" svg:height="1.684cm" svg:x="6.095cm" svg:y="5.662cm" presentation:class="title" presentation:placeholder="true" presentation:user-transformed="true">
          <draw:text-box/>
        </draw:frame>
        <presentation:notes draw:style-name="dp2">
          <draw:page-thumbnail draw:name="Google Shape;19;gd9d9e36cb3_0_15:notes" draw:style-name="gr1" draw:layer="layout" svg:width="16.932cm" svg:height="9.524cm" svg:x="1.059cm" svg:y="1.905cm" draw:page-number="1" presentation:class="page"/>
          <draw:frame draw:name="Google Shape;20;gd9d9e36cb3_0_15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27;p6" presentation:style-name="pr3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" presentation:style-name="pr4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2">
          <draw:page-thumbnail draw:name="Google Shape;24;gd9d9e36cb3_0_5:notes" draw:style-name="gr1" draw:layer="layout" svg:width="16.932cm" svg:height="9.524cm" svg:x="1.059cm" svg:y="1.905cm" draw:page-number="2" presentation:class="page"/>
          <draw:frame draw:name="Google Shape;25;gd9d9e36cb3_0_5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27;p6_0" presentation:style-name="pr6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0" presentation:style-name="pr7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0" draw:style-name="gr1" draw:layer="layout" svg:width="16.932cm" svg:height="9.524cm" svg:x="1.059cm" svg:y="1.905cm" draw:page-number="3" presentation:class="page"/>
          <draw:frame draw:name="Google Shape;25;gd9d9e36cb3_0_0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27;p6_1" presentation:style-name="pr9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1" presentation:style-name="pr10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1" draw:style-name="gr1" draw:layer="layout" svg:width="16.932cm" svg:height="9.524cm" svg:x="1.059cm" svg:y="1.905cm" draw:page-number="4" presentation:class="page"/>
          <draw:frame draw:name="Google Shape;25;gd9d9e36cb3_0_1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27;p6_2" presentation:style-name="pr12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2" presentation:style-name="pr13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2" draw:style-name="gr1" draw:layer="layout" svg:width="16.932cm" svg:height="9.524cm" svg:x="1.059cm" svg:y="1.905cm" draw:page-number="5" presentation:class="page"/>
          <draw:frame draw:name="Google Shape;25;gd9d9e36cb3_0_2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27;p6_3" presentation:style-name="pr15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3" presentation:style-name="pr16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3" draw:style-name="gr1" draw:layer="layout" svg:width="16.932cm" svg:height="9.524cm" svg:x="1.059cm" svg:y="1.905cm" draw:page-number="6" presentation:class="page"/>
          <draw:frame draw:name="Google Shape;25;gd9d9e36cb3_0_3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27;p6_4" presentation:style-name="pr18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4" presentation:style-name="pr19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4" draw:style-name="gr1" draw:layer="layout" svg:width="16.932cm" svg:height="9.524cm" svg:x="1.059cm" svg:y="1.905cm" draw:page-number="7" presentation:class="page"/>
          <draw:frame draw:name="Google Shape;25;gd9d9e36cb3_0_4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27;p6_5" presentation:style-name="pr21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5" presentation:style-name="pr22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5" draw:style-name="gr1" draw:layer="layout" svg:width="16.932cm" svg:height="9.524cm" svg:x="1.059cm" svg:y="1.905cm" draw:page-number="8" presentation:class="page"/>
          <draw:frame draw:name="Google Shape;25;gd9d9e36cb3_0_5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27;p6_6" presentation:style-name="pr24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6" presentation:style-name="pr25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6" draw:style-name="gr1" draw:layer="layout" svg:width="16.932cm" svg:height="9.524cm" svg:x="1.059cm" svg:y="1.905cm" draw:page-number="9" presentation:class="page"/>
          <draw:frame draw:name="Google Shape;25;gd9d9e36cb3_0_6" presentation:style-name="pr2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27;p6_7" presentation:style-name="pr27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7" presentation:style-name="pr28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7" draw:style-name="gr1" draw:layer="layout" svg:width="16.932cm" svg:height="9.524cm" svg:x="1.059cm" svg:y="1.905cm" draw:page-number="10" presentation:class="page"/>
          <draw:frame draw:name="Google Shape;25;gd9d9e36cb3_0_7" presentation:style-name="pr2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27;p6_8" presentation:style-name="pr30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8" presentation:style-name="pr31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8" draw:style-name="gr1" draw:layer="layout" svg:width="16.932cm" svg:height="9.524cm" svg:x="1.059cm" svg:y="1.905cm" draw:page-number="11" presentation:class="page"/>
          <draw:frame draw:name="Google Shape;25;gd9d9e36cb3_0_8" presentation:style-name="pr3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27;p6_9" presentation:style-name="pr33" draw:text-style-name="P3" draw:layer="layout" svg:width="22.979cm" svg:height="1.362cm" svg:x="2.42cm" svg:y="0.394cm" presentation:class="title" presentation:placeholder="true" presentation:user-transformed="true">
          <draw:text-box/>
        </draw:frame>
        <draw:frame draw:name="Google Shape;28;p6_9" presentation:style-name="pr34" draw:text-style-name="P4" draw:layer="layout" svg:width="23.667cm" svg:height="10.217cm" svg:x="0.866cm" svg:y="2.474cm" presentation:class="outline" presentation:placeholder="true" presentation:user-transformed="true">
          <draw:text-box/>
        </draw:frame>
        <presentation:notes draw:style-name="dp1">
          <draw:page-thumbnail draw:name="Google Shape;24;gd9d9e36cb3_0_9" draw:style-name="gr1" draw:layer="layout" svg:width="16.932cm" svg:height="9.524cm" svg:x="1.059cm" svg:y="1.905cm" draw:page-number="12" presentation:class="page"/>
          <draw:frame draw:name="Google Shape;25;gd9d9e36cb3_0_9" presentation:style-name="pr3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presentation:notes draw:style-name="dp2">
          <draw:page-thumbnail draw:name="Google Shape;30;gd9d9e36cb3_0_19:notes" draw:style-name="gr1" draw:layer="layout" svg:width="16.932cm" svg:height="9.524cm" svg:x="1.059cm" svg:y="1.905cm" draw:page-number="13" presentation:class="page"/>
          <draw:frame draw:name="Google Shape;31;gd9d9e36cb3_0_19:notes" presentation:style-name="pr3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 Black" svg:font-family="'Arial Black'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780000004384231BE73F1DE7AC1.png" xlink:type="simple" xlink:show="embed" xlink:actuate="onLoad"/>
    <draw:fill-image draw:name="msFillBitmap_20_2" draw:display-name="msFillBitmap 2" xlink:href="Pictures/100000000000078000000438726CD619E0275A71.png" xlink:type="simple" xlink:show="embed" xlink:actuate="onLoad"/>
    <draw:fill-image draw:name="msFillBitmap_20_3" draw:display-name="msFillBitmap 3" xlink:href="Pictures/100000000000078000000438165C16F76FFA90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155cm" svg:height="1.684cm" svg:x="6.095cm" svg:y="5.662cm" presentation:class="title" presentation:placeholder="true" presentation:user-transformed="true">
        <draw:text-box/>
      </draw:frame>
      <draw:frame draw:name="Google Shape;11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3;p3" presentation:style-name="TITLE_5f_AND_5f_BODY-title" draw:layer="backgroundobjects" svg:width="22.979cm" svg:height="1.362cm" svg:x="2.42cm" svg:y="0.394cm" presentation:class="title" presentation:placeholder="true" presentation:user-transformed="true">
        <draw:text-box/>
      </draw:frame>
      <draw:frame draw:name="Google Shape;14;p3" presentation:style-name="TITLE_5f_AND_5f_BODY-outline1" draw:layer="backgroundobjects" svg:width="23.667cm" svg:height="10.217cm" svg:x="0.866cm" svg:y="2.474cm" presentation:class="outlin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3">
      <draw:frame draw:name="Google Shape;17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1-05-18T14:49:56.157421489</dc:date>
    <meta:editing-duration>PT1M56S</meta:editing-duration>
    <meta:editing-cycles>1</meta:editing-cycles>
    <meta:document-statistic meta:object-count="84"/>
  </office:meta>
</office:document-meta>
</file>